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100" manifest:media-type="application/x-openoffice-wmf;windows_formatname=&quot;Image WMF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content.xml" manifest:media-type="text/xml"/>
  <manifest:file-entry manifest:full-path="Pictures/100000000000043E0000015D9EB8BEE2.jpg" manifest:media-type="image/jpeg"/>
  <manifest:file-entry manifest:full-path="Pictures/1001131400002BDA00002D6E6CF6454B.emf" manifest:media-type="image/x-emf"/>
  <manifest:file-entry manifest:full-path="Pictures/10000001000001A8000001B88555485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áblázat1" style:family="table">
      <style:table-properties style:width="11.502cm" fo:margin-left="3cm" fo:margin-top="0cm" fo:margin-bottom="0cm" table:align="left" style:writing-mode="page"/>
    </style:style>
    <style:style style:name="Táblázat1.A" style:family="table-column">
      <style:table-column-properties style:column-width="5.265cm"/>
    </style:style>
    <style:style style:name="Táblázat1.B" style:family="table-column">
      <style:table-column-properties style:column-width="6.237cm"/>
    </style:style>
    <style:style style:name="Táblázat1.1" style:family="table-row">
      <style:table-row-properties style:min-row-height="0.665cm" fo:keep-together="auto"/>
    </style:style>
    <style:style style:name="Táblázat1.A1" style:family="table-cell">
      <style:table-cell-properties fo:padding-left="0.191cm" fo:padding-right="0.191cm" fo:padding-top="0cm" fo:padding-bottom="0cm" fo:border="none"/>
    </style:style>
    <style:style style:name="Táblázat1.2" style:family="table-row">
      <style:table-row-properties style:min-row-height="0.697cm" fo:keep-together="auto"/>
    </style:style>
    <style:style style:name="Táblázat2" style:family="table">
      <style:table-properties style:width="14.616cm" fo:margin-left="1.175cm" fo:margin-top="0cm" fo:margin-bottom="0cm" table:align="left" style:writing-mode="page"/>
    </style:style>
    <style:style style:name="Táblázat2.A" style:family="table-column">
      <style:table-column-properties style:column-width="14.616cm"/>
    </style:style>
    <style:style style:name="Táblázat2.1" style:family="table-row">
      <style:table-row-properties fo:keep-together="auto"/>
    </style:style>
    <style:style style:name="Táblázat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áblázat3" style:family="table">
      <style:table-properties style:width="16.392cm" fo:margin-left="0.61cm" fo:margin-top="0cm" fo:margin-bottom="0cm" table:align="left" style:writing-mode="page"/>
    </style:style>
    <style:style style:name="Táblázat3.A" style:family="table-column">
      <style:table-column-properties style:column-width="15.633cm"/>
    </style:style>
    <style:style style:name="Táblázat3.B" style:family="table-column">
      <style:table-column-properties style:column-width="0.758cm"/>
    </style:style>
    <style:style style:name="Táblázat3.1" style:family="table-row">
      <style:table-row-properties fo:keep-together="auto"/>
    </style:style>
    <style:style style:name="Táblázat3.A1" style:family="table-cell">
      <style:table-cell-properties fo:padding="0cm" fo:border="none"/>
    </style:style>
    <style:style style:name="Táblázat4" style:family="table">
      <style:table-properties style:width="12.007cm" fo:margin-top="0cm" fo:margin-bottom="0cm" table:align="center" style:writing-mode="page"/>
    </style:style>
    <style:style style:name="Táblázat4.A" style:family="table-column">
      <style:table-column-properties style:column-width="8.35cm"/>
    </style:style>
    <style:style style:name="Táblázat4.B" style:family="table-column">
      <style:table-column-properties style:column-width="3.657cm"/>
    </style:style>
    <style:style style:name="Táblázat4.1" style:family="table-row">
      <style:table-row-properties fo:keep-together="auto"/>
    </style:style>
    <style:style style:name="Táblázat4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pt solid #000000">
        <style:background-image/>
      </style:table-cell-properties>
    </style:style>
    <style:style style:name="Táblázat4.B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Táblázat4.A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áblázat4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áblázat5" style:family="table">
      <style:table-properties style:width="16.351cm" fo:margin-left="0cm" fo:margin-top="0cm" fo:margin-bottom="0cm" table:align="left" style:writing-mode="page"/>
    </style:style>
    <style:style style:name="Táblázat5.A" style:family="table-column">
      <style:table-column-properties style:column-width="0.995cm"/>
    </style:style>
    <style:style style:name="Táblázat5.B" style:family="table-column">
      <style:table-column-properties style:column-width="15.356cm"/>
    </style:style>
    <style:style style:name="Táblázat5.1" style:family="table-row">
      <style:table-row-properties fo:keep-together="auto"/>
    </style:style>
    <style:style style:name="Táblázat5.A1" style:family="table-cell">
      <style:table-cell-properties fo:background-color="transparent" fo:padding-left="0.097cm" fo:padding-right="0.097cm" fo:padding-top="0cm" fo:padding-bottom="0.097cm" fo:border="none">
        <style:background-image/>
      </style:table-cell-properties>
    </style:style>
    <style:style style:name="Táblázat5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edlap_20_cim">
      <style:paragraph-properties fo:margin-left="0.508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text-align="center" style:justify-single-word="false" fo:text-indent="0cm" style:auto-text-indent="false"/>
      <style:text-properties officeooo:rsid="0011908d" officeooo:paragraph-rsid="0011908d"/>
    </style:style>
    <style:style style:name="P5" style:family="paragraph" style:parent-style-name="Standard">
      <style:paragraph-properties fo:margin-left="0cm" fo:text-align="start" style:justify-single-word="false" fo:orphans="2" fo:widows="2" fo:hyphenation-ladder-count="no-limit" fo:hyphenation-keep="page" loext:hyphenation-keep-type="column" loext:hyphenation-keep-line="false" fo:text-indent="0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text-align="center" style:justify-single-word="false" fo:orphans="2" fo:widows="2" fo:hyphenation-ladder-count="no-limit" fo:hyphenation-keep="page" loext:hyphenation-keep-type="column" loext:hyphenation-keep-line="false" fo:text-indent="0cm" style:auto-text-indent="false"/>
      <style:text-properties officeooo:rsid="0011908d" officeooo:paragraph-rsid="0011908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cm" fo:text-align="center" style:justify-single-word="false" fo:orphans="2" fo:widows="2" fo:hyphenation-ladder-count="no-limit" fo:hyphenation-keep="page" loext:hyphenation-keep-type="column" loext:hyphenation-keep-line="false" fo:text-indent="0cm" style:auto-text-indent="false"/>
      <style:text-properties fo:language="en" fo:country="US" officeooo:rsid="0011908d" officeooo:paragraph-rsid="0011908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text-align="center" style:justify-single-word="false" fo:orphans="2" fo:widows="2" fo:hyphenation-ladder-count="no-limit" fo:hyphenation-keep="page" loext:hyphenation-keep-type="column" loext:hyphenation-keep-line="false" fo:text-indent="0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Fedlap_20_cim_20_2">
      <style:paragraph-properties fo:margin-left="0.508cm" fo:text-indent="0cm" style:auto-text-indent="false"/>
    </style:style>
    <style:style style:name="P10" style:family="paragraph" style:parent-style-name="Standard">
      <style:paragraph-properties fo:margin-left="0.61cm" fo:text-indent="0.751cm" style:auto-text-indent="false"/>
    </style:style>
    <style:style style:name="P11" style:family="paragraph" style:parent-style-name="Heading_20_1" style:master-page-name="Converted1">
      <style:paragraph-properties fo:margin-left="0.51cm" fo:text-indent="0cm" style:auto-text-indent="false" style:page-number="1"/>
    </style:style>
    <style:style style:name="P12" style:family="paragraph" style:parent-style-name="Text_20_body">
      <style:paragraph-properties fo:margin-left="0cm" fo:margin-right="0cm" fo:margin-top="0cm" fo:margin-bottom="0.499cm" style:contextual-spacing="false" fo:text-indent="0cm" style:auto-text-indent="false"/>
    </style:style>
    <style:style style:name="P13" style:family="paragraph" style:parent-style-name="Text_20_body">
      <style:paragraph-properties fo:margin-top="0cm" fo:margin-bottom="0.499cm" style:contextual-spacing="false"/>
    </style:style>
    <style:style style:name="P14" style:family="paragraph" style:parent-style-name="Heading_20_2" style:list-style-name="WWNum5"/>
    <style:style style:name="P15" style:family="paragraph" style:parent-style-name="Text_20_body">
      <style:paragraph-properties fo:margin-top="0cm" fo:margin-bottom="0.499cm" style:contextual-spacing="false"/>
      <style:text-properties fo:font-weight="bold"/>
    </style:style>
    <style:style style:name="P16" style:family="paragraph" style:parent-style-name="Text_20_body" style:list-style-name="L1">
      <style:paragraph-properties fo:margin-top="0cm" fo:margin-bottom="0.499cm" style:contextual-spacing="false"/>
    </style:style>
    <style:style style:name="P17" style:family="paragraph" style:parent-style-name="Text_20_body" style:list-style-name="L2">
      <style:paragraph-properties fo:margin-top="0cm" fo:margin-bottom="0.499cm" style:contextual-spacing="false"/>
    </style:style>
    <style:style style:name="P18" style:family="paragraph" style:parent-style-name="Heading_20_1">
      <style:paragraph-properties fo:margin-left="0.51cm" fo:text-indent="0cm" style:auto-text-indent="false" fo:break-before="page"/>
    </style:style>
    <style:style style:name="P19" style:family="paragraph" style:parent-style-name="Text_20_body" style:list-style-name="WWNum2"/>
    <style:style style:name="P20" style:family="paragraph" style:parent-style-name="Standard">
      <style:paragraph-properties fo:text-align="center" style:justify-single-word="false" fo:keep-with-next="always" style:snap-to-layout-grid="false"/>
    </style:style>
    <style:style style:name="P21" style:family="paragraph" style:parent-style-name="Caption1">
      <style:paragraph-properties fo:text-align="center" style:justify-single-word="false"/>
    </style:style>
    <style:style style:name="P22" style:family="paragraph" style:parent-style-name="Text_20_body" style:list-style-name="WWNum3"/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25" style:family="paragraph" style:parent-style-name="Text_20_body">
      <style:paragraph-properties fo:margin-left="0cm" fo:text-align="end" style:justify-single-word="false" fo:text-indent="0cm" style:auto-text-indent="false"/>
    </style:style>
    <style:style style:name="P26" style:family="paragraph" style:parent-style-name="Standard">
      <style:paragraph-properties fo:margin-left="0.61cm" fo:text-indent="0cm" style:auto-text-indent="false" style:snap-to-layout-grid="false"/>
    </style:style>
    <style:style style:name="P27" style:family="paragraph" style:parent-style-name="Standard">
      <style:paragraph-properties fo:text-align="center" style:justify-single-word="false" style:snap-to-layout-grid="false"/>
    </style:style>
    <style:style style:name="P28" style:family="paragraph" style:parent-style-name="Standard">
      <style:paragraph-properties style:snap-to-layout-grid="false"/>
    </style:style>
    <style:style style:name="P29" style:family="paragraph" style:parent-style-name="táblázat">
      <style:paragraph-properties fo:text-align="center" style:justify-single-word="false"/>
    </style:style>
    <style:style style:name="P30" style:family="paragraph" style:parent-style-name="Standard" style:list-style-name="WWNum6"/>
    <style:style style:name="P31" style:family="paragraph" style:parent-style-name="Text_20_body">
      <style:paragraph-properties fo:margin-left="0.61cm" fo:margin-top="0cm" fo:margin-bottom="0cm" style:contextual-spacing="false" fo:text-indent="0cm" style:auto-text-indent="false"/>
    </style:style>
    <style:style style:name="P32" style:family="paragraph" style:parent-style-name="Heading_20_1" style:master-page-name="Converted2">
      <style:paragraph-properties fo:margin-left="0.51cm" fo:text-indent="0cm" style:auto-text-indent="false" style:page-number="auto" fo:break-before="page"/>
    </style:style>
    <style:style style:name="P33" style:family="paragraph" style:parent-style-name="Standard">
      <style:paragraph-properties fo:margin-left="0cm" fo:text-indent="0cm" style:auto-text-indent="false"/>
    </style:style>
    <style:style style:name="P34" style:family="paragraph" style:parent-style-name="Text_20_body">
      <style:paragraph-properties fo:margin-left="0cm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letter-kerning="false" style:font-name-asian="Times New Roman1" style:font-size-asian="14pt" style:font-name-complex="Times New Roman1" style:language-complex="ar" style:country-complex="SA"/>
    </style:style>
    <style:style style:name="T4" style:family="text">
      <style:text-properties fo:font-size="14pt" fo:font-weight="bold" style:letter-kerning="false" style:font-name-asian="Times New Roman1" style:font-size-asian="14pt" style:font-weight-asian="bold" style:font-name-complex="Times New Roman1" style:language-complex="ar" style:country-complex="SA" style:font-weight-complex="bold"/>
    </style:style>
    <style:style style:name="T5" style:family="text">
      <style:text-properties fo:font-size="14pt" fo:language="en" fo:country="US" fo:font-weight="bold" style:letter-kerning="false" style:font-name-asian="Times New Roman1" style:font-size-asian="14pt" style:font-weight-asian="bold" style:font-name-complex="Times New Roman1" style:language-complex="ar" style:country-complex="SA" style:font-weight-complex="bold"/>
    </style:style>
    <style:style style:name="T6" style:family="text">
      <style:text-properties fo:language="hu" fo:country="HU"/>
    </style:style>
    <style:style style:name="T7" style:family="text">
      <style:text-properties fo:font-weight="bold" style:font-weight-asian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4131e" style:font-size-asian="14pt" style:font-weight-asian="bold" style:font-size-complex="14pt" style:font-weight-complex="bold"/>
    </style:style>
    <style:style style:name="T10" style:family="text">
      <style:text-properties fo:font-style="italic"/>
    </style:style>
    <style:style style:name="T11" style:family="text">
      <style:text-properties fo:font-weight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name-complex="FreeSans" style:font-size-complex="12pt" style:font-weight-complex="normal"/>
    </style:style>
    <style:style style:name="T15" style:family="text">
      <style:text-properties style:font-name-asian="Times New Roman1" style:font-weight-complex="bold"/>
    </style:style>
    <style:style style:name="T16" style:family="text">
      <style:text-properties fo:font-weight="bold" style:font-name-asian="Times New Roman1" style:font-weight-asian="bold"/>
    </style:style>
    <style:style style:name="T17" style:family="text">
      <style:text-properties style:font-name-asian="Times New Roman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weight-complex="bold"/>
    </style:style>
    <style:style style:name="T22" style:family="text">
      <style:text-properties fo:font-style="italic" style:font-style-asian="italic" style:font-style-complex="italic" style:font-weight-complex="bold"/>
    </style:style>
    <style:style style:name="T23" style:family="text">
      <style:text-properties style:font-name-complex="Times New Roman1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#ffffff" style:background-transparency="0%" draw:fill="solid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&quot;Figure&quot;"/>
        <text:sequence-decl text:display-outline-level="0" text:name="egyenlet"/>
        <text:sequence-decl text:display-outline-level="0" text:name="&quot;táblázat&quot;"/>
        <text:sequence-decl text:display-outline-level="0" text:name="refnum"/>
      </text:sequence-decls>
      <text:h text:style-name="P1" text:outline-level="1"><draw:frame draw:style-name="fr1" draw:name="Kép 2" text:anchor-type="char" svg:y="0cm" svg:width="14.42cm" svg:height="3.821cm" draw:z-index="1"><draw:image xlink:href="Pictures/100000000000043E0000015D9EB8BEE2.jpg" xlink:type="simple" xlink:show="embed" xlink:actuate="onLoad" draw:mime-type="image/jpeg"/></draw:frame></text:h>
      <text:h text:style-name="P1" text:outline-level="1">Önálló laboratórium beszámoló</text:h>
      <text:p text:style-name="P2">Távközlési és Mesterséges Intelligencia Tanszék</text:p>
      <text:p text:style-name="P2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"><text:span text:style-name="T1">Készítette</text:span>:</text:p>
          </table:table-cell>
          <table:table-cell table:style-name="Táblázat1.A1" office:value-type="string">
            <text:p text:style-name="P4" loext:marker-style-name="T2"><text:span text:style-name="T2">Lóczi László</text:span></text:p>
          </table:table-cell>
        </table:table-row>
        <table:table-row table:style-name="Táblázat1.2">
          <table:table-cell table:style-name="Táblázat1.A1" office:value-type="string">
            <text:p text:style-name="P5" loext:marker-style-name="T3"><text:span text:style-name="T3">Neptun-kód:</text:span><text:span text:style-name="T3"/></text:p>
          </table:table-cell>
          <table:table-cell table:style-name="Táblázat1.A1" office:value-type="string">
            <text:p text:style-name="P4"><text:span text:style-name="T4">XVT166</text:span></text:p>
          </table:table-cell>
        </table:table-row>
        <table:table-row table:style-name="Táblázat1.2">
          <table:table-cell table:style-name="Táblázat1.A1" office:value-type="string">
            <text:p text:style-name="P3"><text:span text:style-name="T3">Szakirány:</text:span></text:p>
          </table:table-cell>
          <table:table-cell table:style-name="Táblázat1.A1" office:value-type="string">
            <text:p text:style-name="P6" loext:marker-style-name="T4"><text:span text:style-name="T4">Mérnökinformatika</text:span></text:p>
          </table:table-cell>
        </table:table-row>
        <table:table-row table:style-name="Táblázat1.2">
          <table:table-cell table:style-name="Táblázat1.A1" office:value-type="string">
            <text:p text:style-name="P5"><text:span text:style-name="T3">E-mail cím:</text:span></text:p>
          </table:table-cell>
          <table:table-cell table:style-name="Táblázat1.A1" office:value-type="string">
            <text:p text:style-name="P6" loext:marker-style-name="T5"><text:span text:style-name="T4">loczilaci0121</text:span><text:span text:style-name="T5">@gmail.com</text:span></text:p>
          </table:table-cell>
        </table:table-row>
        <table:table-row table:style-name="Táblázat1.2">
          <table:table-cell table:style-name="Táblázat1.A1" office:value-type="string">
            <text:p text:style-name="P5"><text:span text:style-name="T3">Konzulens(ek):</text:span></text:p>
          </table:table-cell>
          <table:table-cell table:style-name="Táblázat1.A1" office:value-type="string">
            <text:p text:style-name="P7">Fodor Bal<text:span text:style-name="T6">ázs</text:span></text:p>
          </table:table-cell>
        </table:table-row>
        <table:table-row table:style-name="Táblázat1.2">
          <table:table-cell table:style-name="Táblázat1.A1" office:value-type="string">
            <text:p text:style-name="P5" loext:marker-style-name="T3"><text:span text:style-name="T3">E-mail címe(ik):</text:span><text:span text:style-name="T3"/></text:p>
          </table:table-cell>
          <table:table-cell table:style-name="Táblázat1.A1" office:value-type="string">
            <text:p text:style-name="P8" loext:marker-style-name="T4"><text:span text:style-name="T4">pehades@tmit.bme.hu</text:span><text:span text:style-name="T4"/></text:p>
          </table:table-cell>
        </table:table-row>
      </table:table>
      <text:p text:style-name="P2"/>
      <text:p text:style-name="P2"/>
      <text:h text:style-name="P9" text:outline-level="1">Téma címe: <text:tab/>Felhasználói szeparációs módok vizsgálata Kubernetesben</text:h>
      <text:p text:style-name="P10"/>
      <text:h text:style-name="P9" text:outline-level="1">Feladat</text:h>
      <text:p text:style-name="Standard">&lt;Ezen a helyen a hallgató adott félévre vonatkozó feladatának a leírását várjuk. A hallgató ezt idemásolhatja a feladatkiírásból, esetleg a munkatervéből, de megadhatja saját szavaival is. Ha a munkatervéből másolja ide, akkor <text:span text:style-name="T7">folyószöveggé</text:span> kell szerkeszteni az időrendi bontást. A feladat leírása ne csússzon át a 2. oldalra és ezáltal a tanév sem. A feladatleírás legyen konkrét, definiálja, hogy mit várunk el a félév végére és ne legyen felsorolás-szerű.&gt;</text:p>
      <text:p text:style-name="P10"/>
      <text:p text:style-name="P10"/>
      <text:p text:style-name="P10"/>
      <text:p text:style-name="P2" loext:marker-style-name="T8"><text:span text:style-name="T8">202</text:span><text:span text:style-name="T9">5</text:span><text:span text:style-name="T8">/202</text:span><text:span text:style-name="T9">6</text:span><text:span text:style-name="T8">. 2. félév</text:span></text:p>
      <text:h text:style-name="P11" text:outline-level="1">A laboratóriumi munka környezetének ismertetése, a munka előzményei és kiindulási állapota</text:h>
      <text:h text:style-name="Heading_20_2" text:outline-level="2">1.1 Bevezető </text:h>
      <text:p text:style-name="P12"><text:bookmark text:name="p-rc_34be83a64c6fa62a-61"/>A modern szoftverfejlesztésben és üzemeltetésben meghatározó szerepet tölt be a felhőalapú számítástechnika és a konténerizációs technológia. Az egyre növekvő komplexitású rendszerek kezelésére iparági szabvánnyá vált a Kubernetes (a továbbiakban: K8s), amely egy rendkívül rugalmas és skálázható konténer-orkesztrációs platform. Ahogy a technológia egyre szélesebb körben terjed el az oktatási és nagyvállalati szektorokban, alapvető igénnyé válik az úgynevezett többfelhasználós (multi-tenant) környezetek kialakítása. Ilyen esetekben egyetlen fizikai vagy virtuális klasztert (számítógéphálózatot) több, egymástól független felhasználó vagy csapat használ egyidejűleg. </text:p>
      <text:p text:style-name="P13">A félév során elvégzett laboratóriumi munka fókuszában egy ilyen többfelhasználós, szeparált környezet tervezése és megvalósítása állt. Egy oktatási vagy vizsgáztatási rendszerben – ahol hallgatók és oktatók (adminisztrátorok) dolgoznak ugyanazon az infrastruktúrán – kiemelten fontos, hogy a felhasználók ne férjenek hozzá egymás adataihoz, ne tudják befolyásolni társaik futó alkalmazásait, valamint egyik felhasználó se sajátíthassa ki a rendszer teljes számítási kapacitását. A feladatom az volt, hogy megvizsgáljam és implementáljam azokat a natív K8s mechanizmusokat, amelyek biztosítják a biztonságos logikai elszigetelést, a finomszemcsés jogosultságkezelést, illetve a hardveres erőforrások igazságos elosztását. Az elvégzett munka eredményeként egy olyan konfigurációs modell jött létre, amely garantálja, hogy a hallgatók csak a saját, dedikált környezetükben tevékenykedhetnek, az adminisztrációs vagy vizsgarendszerek pedig teljesen láthatatlanok és hozzáférhetetlenek maradnak számukra.</text:p>
      <text:p text:style-name="Text_20_body"/>
      <text:list text:style-name="WWNum5">
        <text:list-item>
          <text:list>
            <text:list-item>
              <text:h text:style-name="P14" text:outline-level="2">Elméleti összefoglaló</text:h>
            </text:list-item>
          </text:list>
        </text:list-item>
      </text:list>
      <text:p text:style-name="P12"><text:bookmark text:name="p-rc_34be83a64c6fa62a-62"/>A K8s architektúrájának és a feladat szempontjából releváns komponenseinek megértése elengedhetetlen a megvalósított szeparációs modell értelmezéséhez. A rendszer alapvetően két fő részből áll: a vezérlősíkból (Control Plane), amely a klaszter globális állapotáért és a döntéshozatalért felel, valamint a munkacsomópontokból (Node), amelyeken maguk a konténerezett alkalmazások, az úgynevezett Podok futnak . Amikor a klasztert több felhasználó között kell megosztani, a rendszergazdáknak szoftveres szinten kell garantálniuk az elszigeteltséget. Erre a K8s több, egymásra épülő koncepciót biztosít. </text:p>
      <text:p text:style-name="P15">Logikai szeparáció: A Névtér (Namespace)</text:p>
      <text:p text:style-name="P13">A fizikai klaszter logikai részekre bontásának legelső és legfontosabb eszköze a Névtér (Namespace) . A névterek úgy működnek, mint a virtuális mappák egy operációs rendszerben: lehetővé teszik a klaszter erőforrásainak (például alkalmazások, hálózati beállítások, konfigurációk) csoportosítását és elhatárolását. Egy adott névtéren belül az erőforrások neveinek egyedinek kell lenniük, de különböző névterekben létezhetnek azonos nevű komponensek konfliktus nélkül. A többfelhasználós rendszerekben – mint amilyen a vizsgált hallgatói környezet is – az a bevett gyakorlat, hogy minden egyes felhasználó (vagy projekt) egy saját, dedikált névteret kap, amely a munkaterületeként szolgál.</text:p>
      <text:p text:style-name="P15">Azonosítás: A Szolgáltatásfiók (ServiceAccount)</text:p>
      <text:p text:style-name="P13"><text:soft-page-break/>Ahhoz, hogy a K8s rendszerén belül jogosultságokat lehessen kiosztani, szükség van entitásokra, amelyeket a rendszer azonosítani tud. A K8s megkülönbözteti a normál felhasználókat (human users) és a gépi azonosítókat. A klaszteren belüli folyamatok, illetve a K8s API (Application Programming Interface – Alkalmazásprogramozási Felület) felé küldött kérések azonosítására a Szolgáltatásfiók (ServiceAccount) szolgál. Minden névtér rendelkezik egy alapértelmezett szolgáltatásfiókkal, de egyedi fiókok is létrehozhatók. A feladat során a hallgatók (például John, Jane, Bob) és a vizsgarendszer (exam-system) is saját ServiceAccountot kapott, így a rendszer számára pontosan nyomon követhetővé és szabályozhatóvá vált, hogy ki és honnan kezdeményez műveleteket.</text:p>
      <text:p text:style-name="P15">Jogosultságkezelés: Szerepkör alapú hozzáférés-vezérlés (Role-Based Access Control – RBAC)</text:p>
      <text:p text:style-name="P12"><text:bookmark text:name="p-rc_34be83a64c6fa62a-63"/>A K8s biztonsági modelljének gerincét az RBAC (Role-Based Access Control) adja, amely meghatározza, hogy egy hitelesített felhasználó vagy ServiceAccount milyen műveleteket (úgynevezett igéket, mint a <text:span text:style-name="T10">get</text:span>, <text:span text:style-name="T10">list</text:span>, <text:span text:style-name="T10">create</text:span>, <text:span text:style-name="T10">delete</text:span>) végezhet el, és milyen típusú erőforrásokon . A K8s API-n keresztül végzett összes műveletet ez a modul hagyja jóvá vagy utasítja el. </text:p>
      <text:p text:style-name="P13">Az RBAC rendszer két fő komponensből áll:</text:p>
      <text:list text:style-name="L1">
        <text:list-item>
          <text:p text:style-name="P16"><text:span text:style-name="T11">Szerepkör (Role):</text:span> Egy szabálygyűjtemény, amely engedélyeket definiál (például: "engedélyezett a Podok listázása és létrehozása"). A normál Role egy adott Névtérre korlátozódik, tehát az abban megfogalmazott engedélyek nem érvényesek a klaszter más részein.</text:p>
        </text:list-item>
        <text:list-item>
          <text:p text:style-name="P16"><text:span text:style-name="T11">Szerepkör-hozzárendelés (RoleBinding):</text:span> Ez a komponens köti össze a definiált Szerepkört a felhasználóval (Szolgáltatásfiókkal). Ha "John" ServiceAccountjához hozzárendelünk egy "student-role" Szerepkört a "student-john" névtérben, akkor John kizárólag ebben a névtérben fogja tudni elvégezni a Role által megengedett műveleteket.</text:p>
        </text:list-item>
      </text:list>
      <text:p text:style-name="P15">Erőforrás-menedzsment: Resource Quota és LimitRange</text:p>
      <text:p text:style-name="P13">A logikai elszigetelés és a jogosultságkezelés önmagában nem védi meg a klasztert attól, hogy egy felhasználó – akár szándékosan, akár véletlenül – felélje a rendszer teljes hardveres kapacitását (ezt a jelenséget nevezik "zajos szomszéd" vagy "noisy neighbor" problémának). Ennek kiküszöbölésére a K8s erőforrás-korlátokat alkalmaz, jellemzően a CPU (Central Processing Unit – Központi feldolgozóegység) és a RAM (Random Access Memory – Operatív tár) használatára vonatkozóan.</text:p>
      <text:list text:style-name="L2">
        <text:list-item>
          <text:p text:style-name="P17"><text:span text:style-name="T11">Resource Quota (Erőforrás-kvóta):</text:span> A Névtér szintjén határoz meg egy globális felső korlátot. Megadható vele például, hogy egy adott névtérben (például egy hallgató munkaterületén) futó összes alkalmazás együttesen maximum mennyi CPU-t és memóriát igényelhet, illetve maximalizálható a futtatható Podok száma is.</text:p>
        </text:list-item>
        <text:list-item>
          <text:p text:style-name="P17"><text:span text:style-name="T11">LimitRange (Korláttartomány):</text:span> Míg a kvóta a névtér egészére vonatkozik, a LimitRange az egyes Podok vagy konténerek szintjén határoz meg szabályokat (minimum és maximum korlátokat, valamint alapértelmezett értékeket). Ez garantálja, hogy ha egy felhasználó el is felejt korlátokat beállítani a saját alkalmazásánál, a <text:soft-page-break/>rendszer automatikusan érvényesít egy alapértelmezett limitet, megakadályozva ezzel a rendszer túlterhelését.</text:p>
        </text:list-item>
      </text:list>
      <text:p text:style-name="Text_20_body"/>
      <text:h text:style-name="Heading_20_2" text:outline-level="2">1.3 A munka állapota, készültségi foka a félév elején</text:h>
      <text:p text:style-name="Text_20_body">Ebben a részben lehet megadni a korábbi félévekben elvégzett munkát is. Így világosan elkülöníthető az aktuális félévtől. Nem kell hosszasan írni, de ne legyen felsorolás sem. Egy bekezdésben kellene itt leírni, hogy foglalkoztál-e már ezzel a témával, a tanszéken dolgozott-e már valaki rajta. Írd le azt is, hogy mit kaptál kézhez hozzá segítségként.</text:p>
      <text:p text:style-name="Text_20_body"/>
      <text:p text:style-name="Text_20_body"/>
      <text:h text:style-name="P18" text:outline-level="1">Az elvégzett munka és eredmények ismertetése</text:h>
      <text:h text:style-name="Heading_20_2" text:outline-level="2">1.1 &lt;A munkám ismertetése logikus fejezetekre tagoltan&gt;</text:h>
      <text:p text:style-name="Standard">&lt;Én magam (nem a társam!!) a félév során következőket olvastam el / programoztam / készítettem el / teszteltem / dokumentáltam / néztem át / tanultam meg, stb. Tételes leírása és nem felsorolása mindannak, ami a félév során történt, alátámasztandó azon állításom a konzulens/tárgyfelelős felé, hogy összességében mindent beleértve tényleg dolgoztam a TVSZ szerint kreditenként 30 órát, azaz a heti 2 kontakt órás tárgy esetében min. 2,5*30 = 75 munkaórát, illetve a heti 6 kontakt órás tárgy esetében min. 8*30 = 240 munkaórát...&gt;</text:p>
      <text:p text:style-name="Standard">Ebben a részben a hallgató az általa elvégzett munkát mutatja be. Hangsúlyosan a saját munka bemutatása a cél, hiszen a hallgató ezzel igazolja a témavezető és a tárgyfelelős irányába, hogy – folyamatosan fejlődve és egyre több és jobb munkát végezve – a szakdolgozatát/diplomadolgozatát képes lesz megírni. A beszámoló nem munkanapló, nem arra vagyunk kíváncsiak, hogy mit mikor csinált a hallgató és mennyi időt töltött vele, hanem egy eredmény-centrikus beszámolót szeretnénk olvasni. De itt is fontos tudni, hogy megosztott feladat esetén ki-mit csinált, mekkora részt vállalt.</text:p>
      <text:p text:style-name="Standard">Az egész beszámoló elkészítésénél törekedni kell a magyar nyelv szabályainak követésére és a műszaki dokumentáció/tudományos közlemény írásával kapcsolatosan kialakult közmegegyezés szerinti formai követelmények betartására. Tehát nem kell többes számként hivatkozni <text:span text:style-name="T12">saját magunkra, </text:span>kerülni kell a furcsa megfogalmazást, passzív és egyéb kifacsart mondatszerkezeteket. Az <text:span text:style-name="T12">egy</text:span> szót határozatlan névelőként történő használatakor ne írjuk ki számként!<text:span text:style-name="T12"> </text:span></text:p>
      <text:p text:style-name="Standard">A beszámoló természetesen nem csak szöveget tartalmazhat, hanem képleteket, táblázatokat, ábrákat és még sok minden mást. Ezek kapcsán az alábbi elvek irányadók:</text:p>
      <text:list text:style-name="WWNum2">
        <text:list-item>
          <text:p text:style-name="P19">Az ábráknak, képeknek és táblázatoknak mindig van számuk és címük. A cím nem ennyi: 1. ábra, hanem azt írd le, ami látható rajta.</text:p>
        </text:list-item>
        <text:list-item>
          <text:p text:style-name="P19">Az ábrákra, a képekre és a táblázatokra a szövegben hivatkozni kell, és a szövegben elemezni kell azokat. Például az <text:bookmark-ref text:reference-format="text" text:ref-name="_Ref213737731">1</text:bookmark-ref>. ábrán látszik, hogy a vizsgált félévben még két napos csúszással is lehetett jeles érdemjegyet szerezni a tárgyból, de a pontosság még nem garancia a jó jegyre: öten nem kaptak jelest, noha nem késtek a leadással.</text:p>
        </text:list-item>
        <text:list-item>
          <text:p text:style-name="P19">Az ábrák, képek és táblázatok mérete a szükségesnek megfelelő legyen: elég nagy ahhoz, hogy kinyomtatva is olvasható és értelmezhető legyen, de nem nagyobb annál, mint amit szerepe indokol.</text:p>
        </text:list-item>
        <text:list-item>
          <text:p text:style-name="P19">A grafikonoknak a tengelyeken legyenek feliratai és ha releváns, a mértékegység is.</text:p>
        </text:list-item>
        <text:list-item>
          <text:p text:style-name="P19">A képletek esetében nem minden képletre történik hivatkozás, de ahol igen, ott a képletet a műszaki irodalomban jellemző módon a sor végére tett kerek zárójelben lévő számmal jelöljük meg. A képleteket ne képként illeszd be a szövegbe! </text:p>
        </text:list-item>
        <text:list-item>
          <text:p text:style-name="P19">Kódrészleteket, ha nem relevánsak, ne illeszd be képként, főleg ne rossz minőségben. Nyugodtan teheted függelékbe és hivatkozd be a szövegben, mint a képeket, pl. Az 1. számú függelékben található az adatbeolvasó kód, melyet C++ nyelven készítettem el.</text:p>
        </text:list-item>
      </text:list>
      <table:table table:name="Táblázat2" table:style-name="Táblázat2">
        <table:table-column table:style-name="Táblázat2.A"/>
        <text:soft-page-break/>
        <table:table-row table:style-name="Táblázat2.1">
          <table:table-cell table:style-name="Táblázat2.A1" office:value-type="string">
            <text:p text:style-name="P20"><draw:frame draw:style-name="fr2" draw:name="Kép 1" text:anchor-type="as-char" svg:width="8.412cm" svg:height="8.737cm" draw:z-index="0"><draw:image xlink:href="Pictures/1001131400002BDA00002D6E6CF6454B.emf" xlink:type="simple" xlink:show="embed" xlink:actuate="onLoad" draw:mime-type="image/x-emf"/><draw:image xlink:href="Pictures/10000001000001A8000001B885554850.png" xlink:type="simple" xlink:show="embed" xlink:actuate="onLoad" draw:mime-type="image/png"/></draw:frame></text:p>
            <text:p text:style-name="P21" loext:marker-style-name="T13"><text:bookmark-start text:name="_Ref213737731"/><text:sequence text:ref-name="ref&quot;Figure&quot;0" text:name="&quot;Figure&quot;" text:formula="ooow:&quot;Figure&quot;+1" style:num-format="1">1</text:sequence><text:bookmark-end text:name="_Ref213737731"/>. <text:span text:style-name="T13">ábra. Hallgatók érdemjegyeinek eloszlása az írásbeli beszámoló késése függvényében</text:span></text:p>
          </table:table-cell>
        </table:table-row>
      </table:table>
      <text:p text:style-name="Standard"/>
      <text:p text:style-name="Standard">Az írásbeli beszámolót a témavezető és a tárgyfelelős is értékeli. A tárgyfelelősi értékelés szempontjai az alábbiak:</text:p>
      <text:list text:style-name="WWNum3">
        <text:list-item>
          <text:p text:style-name="P22">Megfelel-e az elvégzett munka a félév elején kiadott feladatnak?</text:p>
        </text:list-item>
        <text:list-item>
          <text:p text:style-name="P22">Megfelel-e a beszámoló a formai követelményeknek? Ezen belül:</text:p>
          <text:list>
            <text:list-item>
              <text:p text:style-name="P22">Megfelelő-e az elméleti bevezető és az irodalomjegyzék?</text:p>
            </text:list-item>
            <text:list-item>
              <text:p text:style-name="P22">Egyértelmű-e, hogy mi volt a hallgató saját munkája?</text:p>
            </text:list-item>
            <text:list-item>
              <text:p text:style-name="P22">Megfelelő-e a dokumentum technikai színvonala?</text:p>
            </text:list-item>
          </text:list>
        </text:list-item>
      </text:list>
      <text:p text:style-name="Caption" loext:marker-style-name="T14"><text:span text:style-name="T14">Ezen kívül a tárgyfelelős veszi figyelembe az értékelés során kialakult félévi jegyre vonatkoztatva az ún. „hanyagsági faktor” értékét, amelyet </text:span><text:span text:style-name="T14"><text:bookmark-ref text:reference-format="text" text:ref-name="_Ref321833953">(1)</text:bookmark-ref></text:span><text:span text:style-name="T14"><text:s/>szerint állapítunk meg. </text:span></text:p>
      <text:p text:style-name="P23"><text:tab/><text:tab/><text:tab/></text:p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24"><draw:frame draw:style-name="fr3" draw:name="Objektum1" text:anchor-type="as-char" svg:width="2.709cm" svg:height="0.677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áblázat3.A1" office:value-type="string">
            <text:p text:style-name="P25"><text:bookmark-start text:name="_Ref321833940"/><text:bookmark-start text:name="_Ref321833953"/>(<text:sequence text:ref-name="refegyenlet0" text:name="egyenlet" text:formula="ooow:egyenlet+1" style:num-format="1">1</text:sequence><text:bookmark-end text:name="_Ref321833940"/>)<text:bookmark-end text:name="_Ref321833953"/></text:p>
          </table:table-cell>
        </table:table-row>
      </table:table>
      <text:p text:style-name="P23"><text:tab/><text:tab/><text:tab/><text:tab/><text:tab/><text:tab/><text:tab/></text:p>
      <text:p text:style-name="Text_20_body">Az <text:bookmark-ref text:reference-format="text" text:ref-name="_Ref321833953">(1)</text:bookmark-ref>-ben szereplő a szám a munkaterv beadásában történt késedelemre, míg a b szám az írásbeli beszámoló beadásában történt késedelemre vonatkozik. Utóbbi értékeiről az <text:bookmark-ref text:reference-format="text" text:ref-name="_Ref321832333">1. táblázat</text:bookmark-ref><text:s/>tájékoztat.</text:p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26" loext:marker-style-name="T15"><text:span text:style-name="T15">Az írásbeli beszámoló beadásának napja <text:line-break/>a szóbeli beszámolóhoz képest (munkanapban)</text:span></text:p>
          </table:table-cell>
          <table:table-cell table:style-name="Táblázat4.B1" office:value-type="string">
            <text:p text:style-name="P27" loext:marker-style-name="T15"><text:span text:style-name="T15">A „b” faktor értéke</text:span></text:p>
          </table:table-cell>
        </table:table-row>
        <table:table-row table:style-name="Táblázat4.1">
          <table:table-cell table:style-name="Táblázat4.A2" office:value-type="string">
            <text:p text:style-name="P28" loext:marker-style-name="T16"><text:span text:style-name="T16">-4. nap</text:span></text:p>
          </table:table-cell>
          <table:table-cell table:style-name="Táblázat4.B2" office:value-type="string">
            <text:p text:style-name="P27" loext:marker-style-name="T16"><text:span text:style-name="T16">0.04</text:span><text:span text:style-name="T16"/></text:p>
          </table:table-cell>
        </table:table-row>
        <table:table-row table:style-name="Táblázat4.1">
          <table:table-cell table:style-name="Táblázat4.A2" office:value-type="string">
            <text:p text:style-name="P28" loext:marker-style-name="T16"><text:span text:style-name="T16">-3. nap</text:span></text:p>
          </table:table-cell>
          <table:table-cell table:style-name="Táblázat4.B2" office:value-type="string">
            <text:p text:style-name="P27" loext:marker-style-name="T16"><text:span text:style-name="T16">0.09</text:span><text:span text:style-name="T16"/></text:p>
          </table:table-cell>
        </table:table-row>
        <table:table-row table:style-name="Táblázat4.1">
          <table:table-cell table:style-name="Táblázat4.A2" office:value-type="string">
            <text:p text:style-name="P28" loext:marker-style-name="T16"><text:span text:style-name="T16">-2. nap</text:span></text:p>
          </table:table-cell>
          <table:table-cell table:style-name="Táblázat4.B2" office:value-type="string">
            <text:p text:style-name="P27" loext:marker-style-name="T16"><text:span text:style-name="T16">0.20</text:span><text:span text:style-name="T16"/></text:p>
          </table:table-cell>
        </table:table-row>
        <table:table-row table:style-name="Táblázat4.1">
          <table:table-cell table:style-name="Táblázat4.A2" office:value-type="string">
            <text:p text:style-name="P28" loext:marker-style-name="T16"><text:span text:style-name="T16">-1. nap</text:span></text:p>
          </table:table-cell>
          <table:table-cell table:style-name="Táblázat4.B2" office:value-type="string">
            <text:p text:style-name="P27" loext:marker-style-name="T16"><text:span text:style-name="T16">0.30</text:span><text:span text:style-name="T16"/></text:p>
          </table:table-cell>
        </table:table-row>
      </table:table>
      <text:p text:style-name="P29" loext:marker-style-name="T17"><text:bookmark-start text:name="_Ref321832333"/><text:sequence text:ref-name="ref&quot;táblázat&quot;0" text:name="&quot;táblázat&quot;" text:formula="ooow:&quot;táblázat&quot;+1" style:num-format="1">1</text:sequence>. táblázat<text:bookmark-end text:name="_Ref321832333"/>. <text:span text:style-name="T17">Az írásbeli beszámoló késedelmes beadásával kapcsolatos hanyagsági faktor értéke</text:span></text:p>
      <text:p text:style-name="Standard">A beszámoló értékeléséről részletesebben írunk <text:bookmark-ref text:reference-format="text" text:ref-name="_Ref321833272">[3]</text:bookmark-ref>-ban.</text:p>
      <text:p text:style-name="Standard"><text:soft-page-break/>Itt ismét megemlítjük a rövidítéseket. Ezeket a rövidítéseket, betűszavakat néhány, az infokommunikáció területén nagyon ismert és gyakran használt kifejezéstől (például IP, TCP, GPRS, UMTS) eltekintve ki kell fejteni logikusan az <text:span text:style-name="T12">első használat</text:span> alkalmával (például így: „A GPS (Generalized Processor Sharing) egy ideális folyadékmodellen alapuló csomagütemező eljárás.”). </text:p>
      <text:p text:style-name="Standard">A beszámoló készítése során előfordulhat, hogy a hallgató úgy érzi, hogy alfejezetekkel tagolva jobban olvasható és érthető lenne a beszámoló. Ennek akadálya nincs, de érdemes arra figyelni, hogy a túlzott tagolás sem tesz jót egy írásműnek, illetve hogy a címsorokban a rövidítések és a hivatkozások használata tilos. Tartalomjegyzéket készíteni nem szükséges a beszámolóhoz, de nem is tilos, kivéve azt az esete, amikor nyilvánvalóan terjedelemnövelési célokat szolgál.</text:p>
      <text:p text:style-name="Standard">A beszámoló terjedelme tárgyanként változhat. Általános szabály, hogy 1 hüvelyknél nagyobb margókat ne használjunk, a szöveg legyen egyszeres sortávú, sorkizárt és 12 pontos betűméretű. A bekezdések kezdődjenek behúzással a minta szerint.</text:p>
      <text:p text:style-name="Text_20_body"/>
      <text:h text:style-name="Heading_20_2" text:outline-level="2">2.2 Összefoglalás</text:h>
      <text:p text:style-name="Text_20_body"/>
      <text:p text:style-name="Standard">Ebben a részben az <text:span text:style-name="T12">adott</text:span> <text:span text:style-name="T18">félévre vonatkozó, az Önálló laboratórium tárgy keretében elvégzett munka során </text:span>elért <text:span text:style-name="T19">új </text:span>eredmények ismételt, vázlatos, <text:span text:style-name="T20">tömör</text:span> összefoglalását várjuk, lehetőleg nem felsorolásként. Itt még egyszer ki lehet térni a leglényegesebb eredményekre, valamint a félév során felmerülő nehézségekre, de meg lehet említeni a továbbfejlesztési irányokat, lehetőségeket is. </text:p>
      <text:p text:style-name="Standard">Ezt a részt tagolható a következő pontok megválaszolásával:</text:p>
      <text:list text:style-name="WWNum6">
        <text:list-item>
          <text:p text:style-name="P30">Mi volt az aktuális kérdés, <text:span text:style-name="T7">probléma,</text:span> amivel a félév során foglalkoztál?</text:p>
        </text:list-item>
        <text:list-item>
          <text:p text:style-name="P30">Mi a dolgozat <text:span text:style-name="T7">célja</text:span>, miért érdekes egyáltalán ezzel a problémával foglalkozni?</text:p>
        </text:list-item>
        <text:list-item>
          <text:p text:style-name="P30">Milyen <text:span text:style-name="T7">módszereket</text:span> használtál a probléma megoldása érdekében?</text:p>
        </text:list-item>
        <text:list-item>
          <text:p text:style-name="P30">Mik a legfontosabb <text:span text:style-name="T7">eredmények</text:span>?</text:p>
        </text:list-item>
        <text:list-item>
          <text:p text:style-name="P30">Milyen <text:span text:style-name="T7">következtetéseket</text:span> lehet levonni?</text:p>
        </text:list-item>
      </text:list>
      <text:p text:style-name="Standard">Ha valaki elolvassa ezt a részt, képet kell kapnia az egész dolgozatról!</text:p>
      <text:p text:style-name="Standard"/>
      <text:p text:style-name="Standard">Fontos, hogy az itt megadott sablontól el lehet térni, használata nem kötelező, csak segítséget jelenthet, viszont a fedőlap lehetőleg maradjon ugyanez és tartalmilag egyezzen meg a sablon irányelveivel. A beszámoló felépítésében nem érdemes eltérni a Bevezető - Féléves munka és eredmények bemutatása - Összefoglaló hármastól.</text:p>
      <text:p text:style-name="P31"/>
      <text:h text:style-name="P32" text:outline-level="1">Irodalom, és csatlakozó dokumentumok jegyzéke</text:h>
      <text:h text:style-name="Heading_20_2" text:outline-level="2">A tanulmányozott irodalom jegyzéke:</text:h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33"><text:bookmark-start text:name="_Ref321833265"/><text:bookmark-start text:name="_Ref321833270"/>[<text:sequence text:ref-name="refrefnum0" text:name="refnum" text:formula="ooow:refnum+1" style:num-format="1">1</text:sequence><text:bookmark-end text:name="_Ref321833265"/>]<text:bookmark-end text:name="_Ref321833270"/></text:p>
          </table:table-cell>
          <table:table-cell table:style-name="Táblázat5.B1" office:value-type="string">
            <text:p text:style-name="P34"><text:span text:style-name="T21">Umberto Eco, </text:span><text:span text:style-name="T22">Hogyan írjunk szakdolgozatot?,</text:span> Kairosz Kiadó, 2000, ISBN: 9639137537.</text:p>
          </table:table-cell>
        </table:table-row>
        <table:table-row table:style-name="Táblázat5.1">
          <table:table-cell table:style-name="Táblázat5.A1" office:value-type="string">
            <text:p text:style-name="P33"><text:bookmark-start text:name="_Ref321833346"/>[<text:sequence text:ref-name="refrefnum1" text:name="refnum" text:formula="ooow:refnum+1" style:num-format="1">2</text:sequence>]<text:bookmark-end text:name="_Ref321833346"/></text:p>
          </table:table-cell>
          <table:table-cell table:style-name="Táblázat5.B1" office:value-type="string">
            <text:p text:style-name="P34">Esterházy Péter, <text:span text:style-name="T18">Termelési-regény (Kisssregény)</text:span>, Magvető Könyvkiadó, 2004, ISBN: 9631423948.</text:p>
          </table:table-cell>
        </table:table-row>
        <table:table-row table:style-name="Táblázat5.1">
          <table:table-cell table:style-name="Táblázat5.A1" office:value-type="string">
            <text:p text:style-name="P33"><text:bookmark-start text:name="_Ref321833272"/>[<text:sequence text:ref-name="refrefnum2" text:name="refnum" text:formula="ooow:refnum+1" style:num-format="1">3</text:sequence>]<text:bookmark-end text:name="_Ref321833272"/></text:p>
          </table:table-cell>
          <table:table-cell table:style-name="Táblázat5.B1" office:value-type="string">
            <text:p text:style-name="P34"><text:span text:style-name="T18">Tájékoztató a Műszaki Informatika Szak önálló laboratórium tantárgyainak 2008/9. tanév I. félévi lezárásáról a BME TMIT-en</text:span> (VITMA367, VITMA380, VITT4353, VITT4330), http://inflab.tmit.bme.hu/08o/lezar.shtml, szerk.: Németh Felicián, 2008. november 5. Utolsó letöltés ideje: 2010-10-12</text:p>
          </table:table-cell>
        </table:table-row>
      </table:table>
      <text:p text:style-name="Text_20_body"/>
      <text:p text:style-name="Text_20_body" loext:marker-style-name="T23"><text:span text:style-name="T23">A tanulmányozott irodalmat hivatkozni kell a szövegben! Szükség esetén többször is! Az irodalomjegyzék célja ugyanis kettős:</text:span><text:span text:style-name="T23"/></text:p>
      <text:p text:style-name="Text_20_body">1. <text:s/>Az olvasó tájékoztatása, hogy a dokumentumban ki nem fejtett dolgoknak, a tudottnak vélt ismereteknek hol lehet bővebben utánanézni. Következésképpen ott kell meghivatkozni az irodalmat, ahová az irodalom kapcsolódik.</text:p>
      <text:p text:style-name="Text_20_body">2. Megmutatni a tárgyfelelősnek/konzulensnek az elolvasott irodalom mennyiségét.</text:p>
      <text:p text:style-name="Text_20_body">Javasoljuk, hogy a hallgatók tanulmányozzák, hogyan néznek ki a hivatkozások a villamosmérnöki/informatikai szakma vezető szakmai folyóirataiban megjelenő cikkekben. Ebben a témavezető is biztosan tud segíteni.</text:p>
      <text:p text:style-name="Text_20_body">A hivatkozás teljességére és egyértelműségére tessék ügyelni! Például, ha egy könyvnek több, eltérő kiadása is van, akkor azt is meg kell jelölni, hogy melyik kiadásra hivatkozunk.</text:p>
      <text:p text:style-name="Text_20_body">A webes hivatkozások problémásak szoktak lenni, de manapság egyre több az olyan dokumentum, ami csak weben lelhető fel, ezért használatuk nem zárható ki. Itt is törekedni kell azonban a pontosságra és a visszakereshetőségre. A weben található dokumentumoknak is van címe, szerzője, illetve meg kell adni a letöltés/olvasás időpontját is, hiszen ezek a dokumentumok idővel megváltozhatnak.</text:p>
      <text:p text:style-name="Text_20_body">A wikipédiás hivatkozások használata nem javasolt.</text:p>
      <text:p text:style-name="Text_20_body">Nem publikus dokumentumok hivatkozása nem javasolt és csak kivételes helyzetben elfogadható!</text:p>
      <text:h text:style-name="Heading_20_2" text:outline-level="2">Csatlakozó egyéb elkészült dokumentációk / fájlok / stb. jegyzéke:</text:h>
      <text:p text:style-name="Text_20_body">&lt;A munka ezen beszámolóba be nem fért eredményeinek (pl. forrás fájlok, mindenképpen csatolni akart forráskód részlet, felhasználói leírások, programozói leírások (API), stb.) megnevezése, fellelhetőségi helyének pontos definíciója, mely alapján a az erőforrás előkereshető – értelemszerűen nem nyilvános dokumentumok hivatkozása nem elfogadható.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1cm" fo:margin-top="0cm" fo:margin-bottom="0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711cm" style:auto-text-indent="false" style:writing-mode="lr-tb"/>
      <style:text-properties fo:font-size="12pt" style:letter-kerning="true" style:font-name-asian="DejaVu Sans" style:font-family-asian="'DejaVu Sans'" style:font-family-generic-asian="system" style:font-pitch-asian="variable" style:font-size-asian="12pt" style:language-asian="hi" style:country-asian="I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name-complex="Mangal" style:font-family-complex="Mangal" style:font-family-generic-complex="system" style:font-pitch-complex="variable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Címsor" style:next-style-name="Heading_20_2" style:default-outline-level="1" style:class="chapter">
      <style:paragraph-properties fo:margin-left="0.51cm" fo:margin-top="0.42cm" fo:margin-bottom="0.21cm" style:contextual-spacing="false" fo:text-align="center" style:justify-single-word="false" fo:text-indent="0cm" style:auto-text-indent="false"/>
      <style:text-properties fo:font-weight="bold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21cm" fo:margin-bottom="0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Címsor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size-asian="14pt" style:font-size-complex="14pt"/>
    </style:style>
    <style:style style:name="Felirat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árgymutató" style:family="paragraph" style:parent-style-name="Standard">
      <style:paragraph-properties text:number-lines="false" text:line-number="0"/>
    </style:style>
    <style:style style:name="Fedlap_20_cim" style:display-name="Fedlap cim" style:family="paragraph" style:parent-style-name="Heading_20_1" style:default-outline-level="1" style:list-style-name="">
      <style:paragraph-properties fo:margin-left="0.508cm"/>
      <style:text-properties fo:font-size="24pt" style:font-size-asian="24pt"/>
    </style:style>
    <style:style style:name="Táblázattartalom" style:family="paragraph" style:parent-style-name="Standard">
      <style:paragraph-properties text:number-lines="false" text:line-number="0"/>
      <style:text-properties fo:font-size="14pt" style:font-size-asian="14pt"/>
    </style:style>
    <style:style style:name="Táblázatfejléc" style:family="paragraph" style:parent-style-name="Táblázattartalom">
      <style:paragraph-properties fo:text-align="center" style:justify-single-word="false"/>
      <style:text-properties fo:font-weight="bold" style:font-weight-asian="bold" style:font-weight-complex="bold"/>
    </style:style>
    <style:style style:name="Fedlap_20_cim_20_2" style:display-name="Fedlap cim 2" style:family="paragraph" style:parent-style-name="Fedlap_20_cim" style:next-style-name="Standard">
      <style:text-properties fo:font-size="18pt" style:font-size-asian="18pt"/>
    </style:style>
    <style:style style:name="Fedlap_20_cim_20_3" style:display-name="Fedlap cim 3" style:family="paragraph" style:parent-style-name="Fedlap_20_cim_20_2" style:next-style-name="Standard">
      <style:text-properties fo:font-size="14pt" style:font-size-asian="14pt"/>
    </style:style>
    <style:style style:name="Footnote" style:family="paragraph" style:parent-style-name="Standard" style:class="extra">
      <style:paragraph-properties fo:margin-left="0.499cm" fo:text-indent="-0.499cm" style:auto-text-indent="false" text:number-lines="false" text:line-number="0"/>
      <style:text-properties fo:font-size="10pt" style:font-size-asian="10pt" style:font-size-complex="10pt"/>
    </style:style>
    <style:style style:name="List_20_Bullet_20_21" style:display-name="List Bullet 21" style:family="paragraph" style:parent-style-name="Standard">
      <style:paragraph-properties fo:margin-left="0.635cm" fo:text-indent="-0.635cm" style:auto-text-indent="false">
        <style:tab-stops>
          <style:tab-stop style:position="0.635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start" style:justify-single-word="false" fo:padding="0cm" fo:border-left="none" fo:border-right="none" fo:border-top="none" fo:border-bottom="0.11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padding="0cm" fo:border-left="none" fo:border-right="none" fo:border-top="0.11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1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áblázat" style:family="paragraph" style:parent-style-name="Felirat"/>
    <style:style style:name="Table_20_Contents" style:display-name="Table Contents" style:family="paragraph" style:parent-style-name="Standard" style:class="extra">
      <style:paragraph-properties fo:margin-left="0cm" fo:text-align="start" style:justify-single-word="false" fo:orphans="2" fo:widows="2" fo:hyphenation-ladder-count="no-limit" fo:hyphenation-keep="page" loext:hyphenation-keep-type="column" loext:hyphenation-keep-line="false" fo:text-indent="0cm" style:auto-text-indent="false"/>
      <style:text-properties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loext:linked-style-name="Végjegyzet_20_szövege_20_Char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Lábjegyzet-karakterek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-complex="Times New Roman1" style:font-family-complex="'Times New Roman'" style:font-family-generic-complex="system" style:font-pitch-complex="variable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égjegyzet-karakterek" style:family="text"/>
    <style:style style:name="Végjegyzet_20_szövege_20_Char" style:display-name="Végjegyzet szövege Char" style:family="text">
      <style:text-properties fo:language="hu" fo:country="HU" style:letter-kerning="true" style:font-name-asian="DejaVu Sans" style:font-family-asian="'DejaVu Sans'" style:font-family-generic-asian="system" style:font-pitch-asian="variable" style:language-asian="hi" style:country-asian="I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Times New Roman" fo:font-family="'Times New Roman'" style:font-family-generic="roman" style:font-pitch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>
      <style:text-properties style:font-name="Times New Roman" fo:font-family="'Times New Roman'" style:font-family-generic="roman" style:font-pitch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>
      <style:text-properties style:font-name="Times New Roman" fo:font-family="'Times New Roman'" style:font-family-generic="roman" style:font-pitch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ListLabel_20_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2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2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2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2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2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2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2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9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6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3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0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7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4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1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8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5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007cm" fo:margin-bottom="2.007cm" fo:margin-left="2.007cm" fo:margin-right="2.007cm" fo:background-color="#ffffff" style:writing-mode="lr-tb" style:layout-grid-color="#c0c0c0" style:layout-grid-lines="2568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366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>Beszámoló Péter (BPOX43)<text:tab/><text:tab/>2025-05-05</text:p>
      </style:header>
      <style:footer>
        <text:p text:style-name="Footer"><text:page-number text:select-page="current">6</text:page-number></text:p>
      </style:footer>
    </style:master-page>
    <style:master-page style:name="Converted2" style:page-layout-name="Mpm2" draw:style-name="Mdp1">
      <style:header>
        <text:p text:style-name="Header">Beszámoló Péter (BPOX43)<text:tab/><text:tab/>2017-11-05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vente Csikor</meta:initial-creator>
    <meta:editing-cycles>6</meta:editing-cycles>
    <meta:print-date>1899-12-31T23:00:00</meta:print-date>
    <meta:creation-date>2017-11-20T08:29:00</meta:creation-date>
    <dc:date>2026-05-11T15:02:35.614498500</dc:date>
    <meta:editing-duration>PT15M16S</meta:editing-duration>
    <meta:generator>LibreOffice/25.8.5.2$Windows_X86_64 LibreOffice_project/9c8b85f387cc00a89945a79c9e6239f32e450ac2</meta:generator>
    <meta:document-statistic meta:table-count="5" meta:image-count="2" meta:object-count="1" meta:page-count="9" meta:paragraph-count="112" meta:word-count="2149" meta:character-count="16302" meta:non-whitespace-character-count="14245"/>
    <meta:user-defined meta:name="AppVersion">16.0000</meta:user-defined>
    <meta:user-defined meta:name="GrammarlyDocumentId">39a8c577-af67-44b3-bbff-6fb07d5e70a5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style mathvariant="italic">
                <mtext>hany</mtext>
              </mstyle>
            </mstyle>
          </msub>
          <mo stretchy="false">=</mo>
          <mrow>
            <mn>1</mn>
            <mo stretchy="false">−</mo>
            <mi>a</mi>
            <mo stretchy="false">−</mo>
            <mi>b</mi>
          </mrow>
        </mrow>
      </mstyle>
      <mrow/>
    </mrow>
    <annotation encoding="StarMath 5.0"> size 12{F rSub { size 8{ ital "hany"} } =1 - a - b} {}</annotation>
  </semantics>
</math>
</file>